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400000127C0757B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  <style:text-properties officeooo:rsid="00121790" officeooo:paragraph-rsid="00121790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1790" officeooo:paragraph-rsid="00121790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8651" officeooo:paragraph-rsid="00138651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3865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1790" officeooo:paragraph-rsid="00138651"/>
    </style:style>
    <style:style style:name="P20" style:family="paragraph" style:parent-style-name="Standard">
      <style:text-properties fo:font-style="italic" style:font-style-asian="italic"/>
    </style:style>
    <style:style style:name="P21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2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Arial" fo:font-size="11pt" style:font-name-asian="Arial1" style:font-size-asian="11pt" style:font-name-complex="Arial1" style:font-size-complex="11pt"/>
    </style:style>
    <style:style style:name="T7" style:family="text">
      <style:text-properties style:font-name="Arial" fo:font-size="11pt" fo:font-style="italic" officeooo:rsid="000f9125" style:font-name-asian="Arial1" style:font-size-asian="11pt" style:font-style-asian="italic" style:font-name-complex="Arial1" style:font-size-complex="11pt"/>
    </style:style>
    <style:style style:name="T8" style:family="text">
      <style:text-properties style:font-name="Arial" fo:font-size="11pt" officeooo:rsid="000f9125" style:font-name-asian="Arial1" style:font-size-asian="11pt" style:font-name-complex="Arial1" style:font-size-complex="11pt"/>
    </style:style>
    <style:style style:name="T9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10" style:family="text">
      <style:text-properties officeooo:rsid="00121790"/>
    </style:style>
    <style:style style:name="T11" style:family="text">
      <style:text-properties officeooo:rsid="001386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</text:span>d’intervention</text:p>
      <text:p text:style-name="P2"/>
      <text:p text:style-name="P3">Nina Carducci</text:p>
      <text:p text:style-name="P4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2">I - Comparatif avant et après optimisation</text:span></text:a><text:span text:style-name="T2"><text:tab/>2</text:span></text:p>
          <text:p text:style-name="P7"><text:a xlink:type="simple" xlink:href="#_75j88ale97cb" text:style-name="Index_20_Link" text:visited-style-name="Index_20_Link"><text:span text:style-name="T2">II - Détails des optimisations effectuées</text:span></text:a><text:span text:style-name="T2"><text:tab/>2</text:span></text:p>
          <text:p text:style-name="P8"><text:a xlink:type="simple" xlink:href="#_uxfyskso5n4s" text:style-name="Index_20_Link" text:visited-style-name="Index_20_Link"><text:span text:style-name="T3">1 - Les images</text:span></text:a><text:span text:style-name="T3"><text:tab/>2</text:span></text:p>
          <text:p text:style-name="P8"><text:a xlink:type="simple" xlink:href="#_xkbpxkl6umhk" text:style-name="Index_20_Link" text:visited-style-name="Index_20_Link"><text:span text:style-name="T3">2 - …</text:span></text:a><text:span text:style-name="T3"><text:tab/>2</text:span></text:p>
          <text:p text:style-name="P7"><text:a xlink:type="simple" xlink:href="#_r7gkf09frlj5" text:style-name="Index_20_Link" text:visited-style-name="Index_20_Link"><text:span text:style-name="T2">III - Accessibilité du site</text:span></text:a><text:span text:style-name="T2"><text:tab/>2</text:span></text:p>
          <text:p text:style-name="P7"><text:a xlink:type="simple" xlink:href="#_s89pup9bbtic" text:style-name="Index_20_Link" text:visited-style-name="Index_20_Link"><text:span text:style-name="T2">IV - Détails de réalisation</text:span><text:span text:style-name="T4">s</text:span><text:span text:style-name="T2"> additionnelles à la demande du client</text:span></text:a><text:span text:style-name="T2"><text:tab/>2</text:span></text:p>
          <text:p text:style-name="P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2">Annexe</text:span></text:a><text:span text:style-name="T2"><text:tab/>3</text:span></text:p>
          <text:p text:style-name="P9"><text:a xlink:type="simple" xlink:href="#_3m019n8dyixe" text:style-name="Index_20_Link" text:visited-style-name="Index_20_Link"><text:span text:style-name="T3">Rapport complet de l’audit Lighthouse</text:span></text:a><text:span text:style-name="T3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Heading_20_2"><text:bookmark-start text:name="_2639sr7sbrhx"/><draw:frame draw:style-name="fr1" draw:name="Image1" text:anchor-type="char" svg:width="15.921cm" svg:height="6.486cm" draw:z-index="0"><draw:image xlink:href="Pictures/10000000000002D400000127C0757B15.png" xlink:type="simple" xlink:show="embed" xlink:actuate="onLoad" draw:mime-type="image/png"/></draw:frame><text:bookmark-end text:name="_2639sr7sbrhx"/>Score Lighthouse après optimisation</text:p>
      <text:p text:style-name="Standard">[<text:span text:style-name="T5">Insérer ici une capture des scores Lighthouse après optimisation</text:span>]</text:p>
      <text:p text:style-name="P12"><text:bookmark text:name="_75j88ale97cb"/>II - Détails des optimisations et interventions effectuées</text:p>
      <text:p text:style-name="P13"><text:bookmark text:name="_uxfyskso5n4s"/><text:span text:style-name="T1">1 - Les </text:span>i<text:span text:style-name="T1">mages</text:span></text:p>
      <text:p text:style-name="P5"><text:span text:style-name="T6">Le projet comporte origin</text:span>el<text:span text:style-name="T6">lement </text:span><text:span text:style-name="T7">15</text:span><text:span text:style-name="T6"> images pour un poids total de </text:span><text:span text:style-name="T8">22</text:span><text:span text:style-name="T9"> </text:span><text:span text:style-name="T6">MB. Nous avons effectué les modifications suivantes aux images</text:span> <text:span text:style-name="T6">:</text:span></text:p>
      <text:list text:style-name="WWNum1">
        <text:list-item>
          <text:p text:style-name="P14">…</text:p>
        </text:list-item>
        <text:list-item>
          <text:p text:style-name="P14">…</text:p>
        </text:list-item>
        <text:list-item>
          <text:p text:style-name="P14">…</text:p>
        </text:list-item>
      </text:list>
      <text:p text:style-name="P5"><text:span text:style-name="T6">Après les modifications, le poids total des images est de </text:span><text:span text:style-name="T9">XX </text:span><text:span text:style-name="T6">MB, soit un gain de </text:span><text:span text:style-name="T9">XX </text:span>%.</text:p>
      <text:p text:style-name="P15"><text:bookmark text:name="_xkbpxkl6umhk"/>2 – <text:span text:style-name="T10">Bootstrap</text:span></text:p>
      <text:p text:style-name="P16">Le projet comporte originellement une librairie <text:span text:style-name="T11">css</text:span>: Bootstrap. Nous avons du le supprimer et réécrire le <text:span text:style-name="T11">style.</text:span>css pour qu’il correspond<text:span text:style-name="T11">e</text:span> au site d’<text:span text:style-name="T11">origine sans la librairie.</text:span></text:p>
      <text:p text:style-name="P16"/>
      <text:p text:style-name="P17">Après les modifications, le site a gagne XX % de performance.</text:p>
      <text:p text:style-name="P17"/>
      <text:p text:style-name="P18"><text:soft-page-break/><text:span text:style-name="T11">3</text:span> – <text:span text:style-name="T11">JQuery</text:span></text:p>
      <text:p text:style-name="P19">Le projet comporte originellement une librairie <text:span text:style-name="T11">JavaScript</text:span>: <text:span text:style-name="T11">JQuery</text:span>. Nous avons du le supprimer et réécrire le<text:span text:style-name="T11">s fichiers .js</text:span> pour qu’il correspond<text:span text:style-name="T11">e</text:span> au site d’<text:span text:style-name="T11">origine sans la librairie.</text:span></text:p>
      <text:p text:style-name="P19"/>
      <text:p text:style-name="P17">Après les modifications, le site a gagne XX % de performance.</text:p>
      <text:p text:style-name="P18"><text:span text:style-name="T11">3</text:span> – <text:span text:style-name="T11">Polices d’écriture</text:span></text:p>
      <text:p text:style-name="P19">Le projet comporte originellement <text:span text:style-name="T11">une police d’écriture importer de Google Font</text:span>. Nous avons du supprimer <text:span text:style-name="T11">cet importer cet police localement.</text:span></text:p>
      <text:p text:style-name="P19"/>
      <text:p text:style-name="P17">Après les modifications, le site a gagne XX % de performance.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0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20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20">[Lister les modifications faites pour valider l’accessibilité]</text:p>
      <text:p text:style-name="P11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21">Action</text:p>
          </table:table-cell>
          <table:table-cell table:style-name="Table1.A1" office:value-type="string">
            <text:p text:style-name="P21">Résultat initial</text:p>
          </table:table-cell>
          <table:table-cell table:style-name="Table1.A1" office:value-type="string">
            <text:p text:style-name="P21">Résultat attendu</text:p>
          </table:table-cell>
          <table:table-cell table:style-name="Table1.A1" office:value-type="string">
            <text:p text:style-name="P21">Statut</text:p>
          </table:table-cell>
          <table:table-cell table:style-name="Table1.A1" office:value-type="string">
            <text:p text:style-name="P21">Remarques et commentaires</text:p>
          </table:table-cell>
        </table:table-row>
        <table:table-row table:style-name="Table1.2"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23"/>
          </table:table-cell>
          <table:table-cell table:style-name="Table1.C2" office:value-type="string">
            <text:p text:style-name="P23"/>
          </table:table-cell>
          <table:table-cell table:style-name="Table1.D2" office:value-type="string">
            <text:p text:style-name="P23"/>
          </table:table-cell>
          <table:table-cell table:style-name="Table1.E2" office:value-type="string">
            <text:p text:style-name="P23">À faire / Résolu</text:p>
          </table:table-cell>
          <table:table-cell table:style-name="Table1.F2" office:value-type="string">
            <text:p text:style-name="P23"/>
          </table:table-cell>
        </table:table-row>
        <text:soft-page-break/>
        <table:table-row table:style-name="Table1.3">
          <table:table-cell table:style-name="Table1.A3" office:value-type="string">
            <text:p text:style-name="P22">2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F3" office:value-type="string">
            <text:p text:style-name="P23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6-05-21T17:40:38.564000000</dc:date>
    <meta:editing-duration>PT10H39M41S</meta:editing-duration>
    <meta:editing-cycles>2</meta:editing-cycles>
    <meta:document-statistic meta:table-count="1" meta:image-count="1" meta:object-count="0" meta:page-count="4" meta:paragraph-count="55" meta:word-count="350" meta:character-count="2123" meta:non-whitespace-character-count="1827"/>
  </office:meta>
</office:document-meta>
</file>